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f2681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1">
      <loext:graphic-properties draw:fill="none" draw:fill-color="#ffffff"/>
      <style:paragraph-properties fo:background-color="transparent"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2">
      <loext:graphic-properties draw:fill="none" draw:fill-color="#ffffff"/>
      <style:paragraph-properties fo:background-color="transparent"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Heading">
      <loext:graphic-properties draw:fill="none" draw:fill-color="#ffffff"/>
      <style:paragraph-properties fo:background-color="transparent"/>
    </style:style>
    <style:style style:name="P7" style:family="paragraph" style:parent-style-name="Heading_20_1">
      <style:paragraph-properties fo:break-before="page"/>
      <style:text-properties officeooo:rsid="002f1913" officeooo:paragraph-rsid="002f1913"/>
    </style:style>
    <style:style style:name="P8" style:family="paragraph" style:parent-style-name="Heading_20_1" style:list-style-name="">
      <style:text-properties officeooo:rsid="002f1913" officeooo:paragraph-rsid="002f1913"/>
    </style:style>
    <style:style style:name="P9" style:family="paragraph" style:parent-style-name="Heading_20_1">
      <style:paragraph-properties fo:break-before="page"/>
      <style:text-properties officeooo:rsid="002f2681" officeooo:paragraph-rsid="002f2681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paragraph-properties fo:break-before="page"/>
      <style:text-properties officeooo:rsid="002edea6" officeooo:paragraph-rsid="002edea6"/>
    </style:style>
    <style:style style:name="P12" style:family="paragraph" style:parent-style-name="Standard">
      <loext:graphic-properties draw:fill="none" draw:fill-color="#ffffff"/>
      <style:paragraph-properties fo:background-color="transparent"/>
    </style:style>
    <style:style style:name="P13" style:family="paragraph" style:parent-style-name="Standard">
      <style:text-properties fo:font-weight="bold" officeooo:paragraph-rsid="001fd15b" style:font-weight-asian="bold" style:font-weight-complex="bold"/>
    </style:style>
    <style:style style:name="P14" style:family="paragraph" style:parent-style-name="Standard">
      <style:paragraph-properties fo:margin-left="0in" fo:text-indent="0in" style:auto-text-indent="false"/>
      <style:text-properties fo:font-weight="bold" officeooo:paragraph-rsid="001fd15b" style:font-weight-asian="bold" style:font-weight-complex="bold"/>
    </style:style>
    <style:style style:name="P15" style:family="paragraph" style:parent-style-name="Standard">
      <style:text-properties fo:font-weight="bold" officeooo:paragraph-rsid="002145fa" style:font-weight-asian="bold" style:font-weight-complex="bold"/>
    </style:style>
    <style:style style:name="P16" style:family="paragraph" style:parent-style-name="Standard">
      <style:text-properties fo:font-weight="bold" officeooo:paragraph-rsid="00216820" style:font-weight-asian="bold" style:font-weight-complex="bold"/>
    </style:style>
    <style:style style:name="P17" style:family="paragraph" style:parent-style-name="Standard">
      <style:paragraph-properties fo:margin-left="0in" fo:text-indent="0in" style:auto-text-indent="false"/>
      <style:text-properties fo:font-weight="bold" officeooo:paragraph-rsid="00261ff8" style:font-weight-asian="bold" style:font-weight-complex="bold"/>
    </style:style>
    <style:style style:name="P18" style:family="paragraph" style:parent-style-name="Standard">
      <style:paragraph-properties fo:margin-left="0in" fo:text-indent="0in" style:auto-text-indent="false"/>
      <style:text-properties fo:font-weight="bold" officeooo:paragraph-rsid="0026eae0" style:font-weight-asian="bold" style:font-weight-complex="bold"/>
    </style:style>
    <style:style style:name="P19" style:family="paragraph" style:parent-style-name="Standard">
      <style:text-properties officeooo:paragraph-rsid="001e77da"/>
    </style:style>
    <style:style style:name="P20" style:family="paragraph" style:parent-style-name="Standard">
      <style:paragraph-properties fo:margin-left="0.4925in" fo:text-indent="0in" style:auto-text-indent="false"/>
      <style:text-properties officeooo:paragraph-rsid="001e77da"/>
    </style:style>
    <style:style style:name="P21" style:family="paragraph" style:parent-style-name="Standard">
      <style:paragraph-properties fo:margin-left="0.9846in" fo:text-indent="0in" style:auto-text-indent="false"/>
      <style:text-properties officeooo:paragraph-rsid="001e77da"/>
    </style:style>
    <style:style style:name="P22" style:family="paragraph" style:parent-style-name="Standard">
      <style:paragraph-properties fo:margin-left="0.4925in" fo:text-indent="0in" style:auto-text-indent="false"/>
    </style:style>
    <style:style style:name="P23" style:family="paragraph" style:parent-style-name="Standard">
      <style:paragraph-properties fo:margin-left="0.9846in" fo:text-indent="0in" style:auto-text-indent="false"/>
    </style:style>
    <style:style style:name="P24" style:family="paragraph" style:parent-style-name="Standard">
      <style:text-properties officeooo:paragraph-rsid="001fd15b"/>
    </style:style>
    <style:style style:name="P25" style:family="paragraph" style:parent-style-name="Standard">
      <style:paragraph-properties fo:margin-left="0.4925in" fo:text-indent="0in" style:auto-text-indent="false"/>
      <style:text-properties officeooo:paragraph-rsid="001fd15b"/>
    </style:style>
    <style:style style:name="P26" style:family="paragraph" style:parent-style-name="Standard">
      <style:paragraph-properties fo:margin-left="0.9846in" fo:text-indent="0in" style:auto-text-indent="false"/>
      <style:text-properties officeooo:paragraph-rsid="001fd15b"/>
    </style:style>
    <style:style style:name="P27" style:family="paragraph" style:parent-style-name="Standard">
      <style:paragraph-properties fo:margin-left="1.4772in" fo:text-indent="0in" style:auto-text-indent="false"/>
      <style:text-properties officeooo:paragraph-rsid="001fd15b"/>
    </style:style>
    <style:style style:name="P28" style:family="paragraph" style:parent-style-name="Standard">
      <style:paragraph-properties fo:margin-left="0in" fo:text-indent="0in" style:auto-text-indent="false"/>
      <style:text-properties officeooo:paragraph-rsid="001fd15b"/>
    </style:style>
    <style:style style:name="P29" style:family="paragraph" style:parent-style-name="Standard" style:list-style-name="L2">
      <style:text-properties officeooo:paragraph-rsid="001fd15b"/>
    </style:style>
    <style:style style:name="P30" style:family="paragraph" style:parent-style-name="Standard">
      <style:text-properties officeooo:paragraph-rsid="002145fa"/>
    </style:style>
    <style:style style:name="P31" style:family="paragraph" style:parent-style-name="Standard">
      <style:paragraph-properties fo:margin-left="0.9846in" fo:text-indent="0in" style:auto-text-indent="false"/>
      <style:text-properties officeooo:paragraph-rsid="002145fa"/>
    </style:style>
    <style:style style:name="P32" style:family="paragraph" style:parent-style-name="Standard">
      <style:paragraph-properties fo:margin-left="1.4772in" fo:text-indent="0in" style:auto-text-indent="false"/>
      <style:text-properties officeooo:paragraph-rsid="002145fa"/>
    </style:style>
    <style:style style:name="P33" style:family="paragraph" style:parent-style-name="Standard">
      <style:paragraph-properties fo:margin-left="0.4925in" fo:text-indent="0in" style:auto-text-indent="false"/>
      <style:text-properties fo:font-style="italic" officeooo:paragraph-rsid="001fd15b" style:font-style-asian="italic" style:font-style-complex="italic"/>
    </style:style>
    <style:style style:name="P34" style:family="paragraph" style:parent-style-name="Standard">
      <style:paragraph-properties fo:margin-left="0.4925in" fo:text-indent="0in" style:auto-text-indent="false"/>
      <style:text-properties officeooo:paragraph-rsid="00216820"/>
    </style:style>
    <style:style style:name="P35" style:family="paragraph" style:parent-style-name="Standard">
      <style:paragraph-properties fo:margin-left="0.9846in" fo:text-indent="0in" style:auto-text-indent="false"/>
      <style:text-properties officeooo:paragraph-rsid="00216820"/>
    </style:style>
    <style:style style:name="P36" style:family="paragraph" style:parent-style-name="Standard">
      <style:text-properties officeooo:paragraph-rsid="00216820"/>
    </style:style>
    <style:style style:name="P37" style:family="paragraph" style:parent-style-name="Standard">
      <style:paragraph-properties fo:margin-left="0.4925in" fo:text-indent="0in" style:auto-text-indent="false"/>
      <style:text-properties officeooo:paragraph-rsid="002339a7"/>
    </style:style>
    <style:style style:name="P38" style:family="paragraph" style:parent-style-name="Standard">
      <style:paragraph-properties fo:margin-left="0.9846in" fo:text-indent="0in" style:auto-text-indent="false"/>
      <style:text-properties officeooo:paragraph-rsid="002339a7"/>
    </style:style>
    <style:style style:name="P39" style:family="paragraph" style:parent-style-name="Standard">
      <style:paragraph-properties fo:margin-left="1.4772in" fo:text-indent="0in" style:auto-text-indent="false"/>
      <style:text-properties officeooo:paragraph-rsid="002339a7"/>
    </style:style>
    <style:style style:name="P40" style:family="paragraph" style:parent-style-name="Standard">
      <style:paragraph-properties fo:margin-left="1.4772in" fo:text-indent="0in" style:auto-text-indent="false"/>
      <style:text-properties officeooo:paragraph-rsid="00250eb1"/>
    </style:style>
    <style:style style:name="P41" style:family="paragraph" style:parent-style-name="Standard">
      <style:paragraph-properties fo:margin-left="0.9846in" fo:text-indent="0in" style:auto-text-indent="false"/>
      <style:text-properties officeooo:paragraph-rsid="00250eb1"/>
    </style:style>
    <style:style style:name="P42" style:family="paragraph" style:parent-style-name="Standard">
      <style:paragraph-properties fo:margin-left="0in" fo:text-indent="0in" style:auto-text-indent="false"/>
      <style:text-properties officeooo:paragraph-rsid="00261ff8"/>
    </style:style>
    <style:style style:name="P43" style:family="paragraph" style:parent-style-name="Standard">
      <style:paragraph-properties fo:margin-left="0.4925in" fo:text-indent="0in" style:auto-text-indent="false"/>
      <style:text-properties officeooo:paragraph-rsid="00261ff8"/>
    </style:style>
    <style:style style:name="P44" style:family="paragraph" style:parent-style-name="Standard">
      <style:paragraph-properties fo:margin-left="0.9846in" fo:text-indent="0in" style:auto-text-indent="false"/>
      <style:text-properties officeooo:paragraph-rsid="00261ff8"/>
    </style:style>
    <style:style style:name="P45" style:family="paragraph" style:parent-style-name="Standard">
      <style:paragraph-properties fo:margin-left="0.4925in" fo:text-indent="0in" style:auto-text-indent="false"/>
      <style:text-properties officeooo:paragraph-rsid="0026d27a"/>
    </style:style>
    <style:style style:name="P46" style:family="paragraph" style:parent-style-name="Standard">
      <style:paragraph-properties fo:margin-left="0.9846in" fo:text-indent="0in" style:auto-text-indent="false"/>
      <style:text-properties officeooo:paragraph-rsid="0026d27a"/>
    </style:style>
    <style:style style:name="P47" style:family="paragraph" style:parent-style-name="Standard">
      <style:paragraph-properties fo:margin-left="1.4772in" fo:text-indent="0in" style:auto-text-indent="false"/>
      <style:text-properties officeooo:paragraph-rsid="0026d27a"/>
    </style:style>
    <style:style style:name="P48" style:family="paragraph" style:parent-style-name="Standard">
      <style:paragraph-properties fo:margin-left="0in" fo:text-indent="0in" style:auto-text-indent="false"/>
      <style:text-properties officeooo:paragraph-rsid="0026eae0"/>
    </style:style>
    <style:style style:name="P49" style:family="paragraph" style:parent-style-name="Standard">
      <style:paragraph-properties fo:margin-left="0.4925in" fo:text-indent="0in" style:auto-text-indent="false"/>
      <style:text-properties officeooo:paragraph-rsid="0026eae0"/>
    </style:style>
    <style:style style:name="P50" style:family="paragraph" style:parent-style-name="Standard">
      <style:paragraph-properties fo:margin-left="0.9846in" fo:text-indent="0in" style:auto-text-indent="false"/>
      <style:text-properties officeooo:paragraph-rsid="0026eae0"/>
    </style:style>
    <style:style style:name="P51" style:family="paragraph" style:parent-style-name="Standard">
      <style:paragraph-properties fo:margin-left="1.4772in" fo:text-indent="0in" style:auto-text-indent="false"/>
      <style:text-properties officeooo:paragraph-rsid="0026eae0"/>
    </style:style>
    <style:style style:name="P52" style:family="paragraph">
      <style:text-properties style:font-name="Cascadia Mono" fo:font-size="12pt"/>
    </style:style>
    <style:style style:name="P53" style:family="paragraph">
      <loext:graphic-properties draw:fill="none" draw:fill-color="#ffffff"/>
      <style:text-properties style:font-name="Cascadia Mono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15b"/>
    </style:style>
    <style:style style:name="T3" style:family="text">
      <style:text-properties officeooo:rsid="0021682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6d27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6eae0"/>
    </style:style>
    <style:style style:name="T8" style:family="text">
      <style:text-properties officeooo:rsid="002b6447"/>
    </style:style>
    <style:style style:name="T9" style:family="text">
      <style:text-properties fo:color="#000000" loext:opacity="100%" style:font-name="Cascadia Mono" fo:font-size="12pt" fo:language="zxx" fo:country="none" fo:font-style="normal" style:text-underline-style="none" fo:font-weight="normal" fo:background-color="transparent"/>
    </style:style>
    <style:style style:name="T10" style:family="text">
      <style:text-properties fo:color="#427b58" loext:opacity="100%" style:font-name="Cascadia Mono" fo:font-size="12pt" fo:language="zxx" fo:country="none" fo:font-style="normal" style:text-underline-style="none" fo:font-weight="normal" fo:background-color="transparent"/>
    </style:style>
    <style:style style:name="T11" style:family="text">
      <style:text-properties fo:color="#79740e" loext:opacity="100%" style:font-name="Cascadia Mono" fo:font-size="12pt" fo:language="zxx" fo:country="none" fo:font-style="normal" style:text-underline-style="none" fo:font-weight="normal" fo:background-color="transpar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ch2_options="{'Style': 'gruvbox-light', 'Language': 'JSON', 'UseCharStyles': False, 'LineNumberRatio': 100, 'LineNumberStart': 1, 'MasterCharStyle': '', 'ShowLineNumbers': 0, 'ColourizeBackground': 0, 'LineNumberSeparator': '  ', 'LineNumberPaddingSymbol': '', 'StoreOptionsWithSnippet': 1}" draw:stroke="none" svg:stroke-color="#000000" draw:fill="none" draw:fill-color="#ffffff" fo:min-height="1.1508in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2_293003922" text:style-name="Index_20_Link" text:visited-style-name="Index_20_Link">Python<text:tab/>2</text:a></text:p>
          <text:p text:style-name="P4"><text:a xlink:type="simple" xlink:href="#__RefHeading___Toc24_293003922" text:style-name="Index_20_Link" text:visited-style-name="Index_20_Link">Main Functions<text:tab/>2</text:a></text:p>
          <text:p text:style-name="P4"><text:a xlink:type="simple" xlink:href="#__RefHeading___Toc26_293003922" text:style-name="Index_20_Link" text:visited-style-name="Index_20_Link">Token API/Abstract<text:tab/>4</text:a></text:p>
          <text:p text:style-name="P4"><text:a xlink:type="simple" xlink:href="#__RefHeading___Toc28_293003922" text:style-name="Index_20_Link" text:visited-style-name="Index_20_Link">Coverages API<text:tab/>5</text:a></text:p>
          <text:p text:style-name="P4"><text:a xlink:type="simple" xlink:href="#__RefHeading___Toc30_293003922" text:style-name="Index_20_Link" text:visited-style-name="Index_20_Link">Service Reviews API<text:tab/>6</text:a></text:p>
          <text:p text:style-name="P4"><text:a xlink:type="simple" xlink:href="#__RefHeading___Toc32_293003922" text:style-name="Index_20_Link" text:visited-style-name="Index_20_Link">Payer List API<text:tab/>7</text:a></text:p>
        </text:index-body>
      </text:table-of-content>
      <text:p text:style-name="P12"/>
      <text:h text:style-name="P8" text:outline-level="1"/>
      <text:h text:style-name="P7" text:outline-level="1" text:is-list-header="true"><text:bookmark-start text:name="__RefHeading___Toc22_293003922"/>Python<text:bookmark-end text:name="__RefHeading___Toc22_293003922"/></text:h>
      <text:h text:style-name="Heading_20_2" text:outline-level="2"><text:bookmark-start text:name="__RefHeading___Toc24_293003922"/><text:span text:style-name="T8">Main </text:span>Functions<text:bookmark-end text:name="__RefHeading___Toc24_293003922"/></text:h>
      <text:p text:style-name="P13">FILE</text:p>
      <text:p text:style-name="P24"><text:s text:c="4"/>availityfunctions.py</text:p>
      <text:p text:style-name="Standard"/>
      <text:p text:style-name="P19"><text:span text:style-name="T1">FUNCTIONS</text:span></text:p>
      <text:p text:style-name="P19"><text:span text:style-name="T1"><text:tab/>getAuthInfo</text:span>(key, secret, params, hashes: tuple = None)</text:p>
      <text:p text:style-name="P21">Info on if prior auth is required and if it isn't, what the status is for (if there exists) a requet for one.</text:p>
      <text:p text:style-name="Standard"/>
      <text:p text:style-name="P19"><text:tab/>Args:</text:p>
      <text:p text:style-name="P19"><text:tab/><text:tab/>params (json): all search parameters</text:p>
      <text:p text:style-name="P21">hashes (tuple, optional): should be (coverages, serviceReview) if included. Defaults to None, where that info is pulled.</text:p>
      <text:p text:style-name="Standard"/>
      <text:p text:style-name="Standard"><text:tab/>Returns:</text:p>
      <text:p text:style-name="Standard"><text:tab/><text:tab/>json: if auth is required, the auth start date, auth end date,</text:p>
      <text:p text:style-name="Standard"><text:tab/><text:tab/>auth reference number, and auth status</text:p>
      <text:p text:style-name="Standard"/>
      <text:p text:style-name="P19"><text:tab/><text:span text:style-name="T1">getFromApi</text:span>(key: str, secret: str, params: json, api: str) -&gt; json</text:p>
      <text:p text:style-name="Standard"/>
      <text:p text:style-name="Standard"><text:s text:c="4"/><text:tab/><text:span text:style-name="T1">patientPaymentInfo</text:span>(key, secret, params, hash=None)</text:p>
      <text:p text:style-name="Standard"><text:s text:c="8"/><text:tab/><text:tab/>Get all payment/benefit info (deductibles, coPay, etc.) for Medical Care benefits</text:p>
      <text:p text:style-name="Standard"/>
      <text:p text:style-name="P22">Args:</text:p>
      <text:p text:style-name="P23">params (json): all search parameters</text:p>
      <text:p text:style-name="P21">hash (string, optional): the hash for the coverage results if had. Defaults to None. Pulls new info if none specified</text:p>
      <text:p text:style-name="P21"/>
      <text:p text:style-name="P20">Returns:</text:p>
      <text:p text:style-name="P20"><text:s text:c="12"/>list[json]: list of plans and all of their benefits</text:p>
      <text:p text:style-name="P20"><text:span text:style-name="T1"/></text:p>
      <text:p text:style-name="P20"><text:span text:style-name="T1">pullBenefits</text:span>(key, secret, params, hashes: tuple = None)</text:p>
      <text:p text:style-name="P21">Pull benefits information, to include plan start/end dates, relationship to subscriber, if they have medicare, and if HSTs are covered<text:span text:style-name="T2">*</text:span></text:p>
      <text:p text:style-name="P21">*not currently available</text:p>
      <text:p text:style-name="P22"/>
      <text:p text:style-name="P22">Args:</text:p>
      <text:p text:style-name="P23">params (json): all search parameters</text:p>
      <text:p text:style-name="P23">hashes (tuple, optional): should be (coverages, serviceReview) if included. Defaults to None, where that info is pulled.</text:p>
      <text:p text:style-name="Standard"/>
      <text:p text:style-name="P22">Returns:</text:p>
      <text:p text:style-name="P23">list[json]: results</text:p>
      <text:p text:style-name="Standard"><text:span text:style-name="T1"/></text:p>
      <text:p text:style-name="P20"><text:soft-page-break/><text:span text:style-name="T1">readCachedFile</text:span>(key, secret, params, hash: tuple[str, str] = None) -&gt; json</text:p>
      <text:p text:style-name="P21">pull cached/cache api results for parsing</text:p>
      <text:p text:style-name="Standard"/>
      <text:p text:style-name="P22">Args:</text:p>
      <text:p text:style-name="P23">params (json): parameters for search, should not cause issue if filled with more information than strictly necessary, given parameter cleaning.</text:p>
      <text:p text:style-name="P23">hash (tuple[str, str], optional): (name of api, results). Defaults to None. If none is entered, new results will be pulled and hashed.</text:p>
      <text:p text:style-name="Standard"/>
      <text:p text:style-name="P22">Returns:</text:p>
      <text:p text:style-name="P25"><text:s text:c="12"/>json: results for covered and service reviews with format:</text:p>
      <text:p text:style-name="P20"><draw:frame text:anchor-type="char" draw:z-index="0" draw:name="Text Frame 1" draw:style-name="gr1" draw:text-style-name="P53" svg:width="4.7142in" svg:height="1.1634in" svg:x="1.0165in" svg:y="0.0429in"><draw:text-box><text:p text:style-name="P52"><text:span text:style-name="T9">{</text:span></text:p><text:p text:style-name="P52"><text:span text:style-name="T9"><text:tab/></text:span><text:span text:style-name="T10">"{hash[0]}"</text:span><text:span text:style-name="T9">: {</text:span></text:p><text:p text:style-name="P52"><text:span text:style-name="T9"><text:tab/></text:span><text:span text:style-name="T9"><text:tab/></text:span><text:span text:style-name="T9"><text:tab/></text:span><text:span text:style-name="T10">"hash"</text:span><text:span text:style-name="T9">: </text:span><text:span text:style-name="T11">"{hash{1}}"</text:span><text:span text:style-name="T9">,</text:span></text:p><text:p text:style-name="P52"><text:span text:style-name="T9"><text:tab/></text:span><text:span text:style-name="T9"><text:tab/></text:span><text:span text:style-name="T9"><text:tab/></text:span><text:span text:style-name="T10">"data"</text:span><text:span text:style-name="T9">: </text:span><text:span text:style-name="T11">"{api results}"</text:span></text:p><text:p text:style-name="P52"><text:span text:style-name="T9"><text:tab/></text:span><text:span text:style-name="T9"><text:tab/></text:span><text:span text:style-name="T9">}</text:span></text:p><text:p text:style-name="P52"><text:span text:style-name="T9"><text:s/></text:span><text:span text:style-name="T9">}</text:span></text:p></draw:text-box></draw:frame><text:span text:style-name="T1"/></text:p>
      <text:p text:style-name="P25"><text:span text:style-name="T1">retrieveInfo</text:span>(key: str, secret: str, params: json, api: str) -&gt; st<text:span text:style-name="T2">r</text:span></text:p>
      <text:p text:style-name="P26">Retrieve cached response info</text:p>
      <text:p text:style-name="Standard"/>
      <text:p text:style-name="P22">Args:</text:p>
      <text:p text:style-name="P23">params (json): parameters for search, should not cause issue if filled with more information than strictly necessary, given parameter cleaning.</text:p>
      <text:p text:style-name="Standard"/>
      <text:p text:style-name="P22">Returns:</text:p>
      <text:p text:style-name="P23">tuple[str, str]: (hash for coverages results, hash for service review results)</text:p>
      <text:p text:style-name="Standard"/>
      <text:p text:style-name="P25"><text:span text:style-name="T1">validateInsurance</text:span>(key, secret, params, hash=None)</text:p>
      <text:p text:style-name="P26">Pulls insurance information for all plans returned from params.</text:p>
      <text:p text:style-name="Standard"/>
      <text:p text:style-name="P22">Args:</text:p>
      <text:p text:style-name="P23">params (set of all search parameters)</text:p>
      <text:p text:style-name="P23">hash (string, optional): the hash for the coverage results if had. Defaults to None. Pulls new info if none specified.</text:p>
      <text:p text:style-name="Standard"/>
      <text:p text:style-name="P22">Returns:</text:p>
      <text:p text:style-name="P26">list[json]: list of plan info, each plan result contains:</text:p>
      <text:list text:style-name="L2">
        <text:list-item>
          <text:p text:style-name="P29">status (active, etc.), statusCode, eligibilityStartDate, eligibilityEndDate</text:p>
        </text:list-item>
        <text:list-item>
          <text:p text:style-name="P29">insuranceTypeCode (HMO?, etc), type (Medical Care, Vision, etc.)</text:p>
        </text:list-item>
      </text:list>
      <text:p text:style-name="P24"/>
      <text:h text:style-name="P11" text:outline-level="2"><text:bookmark-start text:name="__RefHeading___Toc26_293003922"/>Token API/Abstract<text:bookmark-end text:name="__RefHeading___Toc26_293003922"/></text:h>
      <text:p text:style-name="P15">FILE</text:p>
      <text:p text:style-name="P30"><text:tab/>availityabstract.py</text:p>
      <text:p text:style-name="P30"/>
      <text:p text:style-name="P13">NAME</text:p>
      <text:p text:style-name="P24"><text:s text:c="4"/>AvailityAbstract</text:p>
      <text:p text:style-name="P24"/>
      <text:p text:style-name="P24"><text:span text:style-name="T1">CLASSES</text:span></text:p>
      <text:p text:style-name="P25"><text:span text:style-name="T1">class AvailityABC</text:span>(abc.ABC)</text:p>
      <text:p text:style-name="P31">Abstract class for all Availity API objects</text:p>
      <text:p text:style-name="P26">AvailityABC(key, secret, patientJSON: str = None)</text:p>
      <text:p text:style-name="P24"/>
      <text:p text:style-name="P33">Methods defined here:</text:p>
      <text:p text:style-name="P24"><text:s text:c="4"/><text:tab/><text:tab/><text:span text:style-name="T1">checkRequiredArgs</text:span>(self, params, payerId, type, subTypeId=None)</text:p>
      <text:p text:style-name="P30"><text:tab/><text:tab/></text:p>
      <text:p text:style-name="P30"><text:tab/><text:tab/><text:span text:style-name="T1">parseInfo</text:span>(self, jsonFile=None) -&gt; dict</text:p>
      <text:p text:style-name="P24"><text:tab/><text:tab/><text:tab/>Parses json file or filename and returns corresponding python dictonary.</text:p>
      <text:p text:style-name="P24"/>
      <text:p text:style-name="P24"><text:tab/><text:tab/>Args:</text:p>
      <text:p text:style-name="P24"><text:tab/><text:tab/><text:tab/>jsonFile (json | string | dict, optional): Defaults to None (returns {}).</text:p>
      <text:p text:style-name="P30"><text:s text:c="3"/><text:tab/><text:tab/></text:p>
      <text:p text:style-name="P30"><text:tab/><text:tab/><text:span text:style-name="T1">resetToken</text:span>(self, key=None, secret=None, login=None)</text:p>
      <text:p text:style-name="P32">Retrieves 5 minute API access token and sets self.authentication accordingly. All args default to None to allow for option of input key, secret or login file. Prioritizes manual key/secret input.</text:p>
      <text:p text:style-name="P30"><text:tab/><text:tab/></text:p>
      <text:p text:style-name="P30"><text:tab/><text:tab/>Args:</text:p>
      <text:p text:style-name="P24"><text:tab/><text:tab/><text:tab/>key (string, optional): API Key.</text:p>
      <text:p text:style-name="P24"><text:tab/><text:tab/><text:tab/>secret (string, optional): API secret.</text:p>
      <text:p text:style-name="P24"><text:tab/><text:tab/><text:tab/>login (json | string, optional): filename of json with login or json itself</text:p>
      <text:p text:style-name="P24"/>
      <text:p text:style-name="P24"/>
      <text:h text:style-name="P10" text:outline-level="2"><text:bookmark-start text:name="__RefHeading___Toc28_293003922"/>Coverages <text:span text:style-name="T8">API</text:span><text:bookmark-end text:name="__RefHeading___Toc28_293003922"/></text:h>
      <text:p text:style-name="P16">FILE</text:p>
      <text:p text:style-name="P34">availitycoverages.py</text:p>
      <text:p text:style-name="P36"/>
      <text:p text:style-name="P13">NAME</text:p>
      <text:p text:style-name="P24"><text:s text:c="4"/>AvailityCoverages</text:p>
      <text:p text:style-name="P24"/>
      <text:p text:style-name="P36"><text:span text:style-name="T1">CLASSES</text:span></text:p>
      <text:p text:style-name="P34"><text:span text:style-name="T1">class Coverages</text:span>(AvailityAbstract.AvailityABC<text:span text:style-name="T3">)</text:span></text:p>
      <text:p text:style-name="P35">Provides access to the Health Transactions Coverages API. Can be used to view plan benefits and current status.</text:p>
      <text:p text:style-name="P35">Coverages(key, secre<text:span text:style-name="T3">t)</text:span></text:p>
      <text:p text:style-name="P34"><text:s/></text:p>
      <text:p text:style-name="P37"><text:span text:style-name="T4">Methods defined here:</text:span></text:p>
      <text:p text:style-name="P38"><text:span text:style-name="T1">get</text:span>(self, parameters: json, returnIds=False)</text:p>
      <text:p text:style-name="P39">Poll for coverage information given a patients information</text:p>
      <text:p text:style-name="P39"/>
      <text:p text:style-name="P38">Args:</text:p>
      <text:p text:style-name="P39">returnIds (bool): if returning a list of the coverage search Ids (True) or the coverage details (false). Defaults to False.</text:p>
      <text:p text:style-name="P26"/>
      <text:p text:style-name="P26">Returns:</text:p>
      <text:p text:style-name="P40">list[str] | json: returns list of ids (strings) or a list of coverages in json format.</text:p>
      <text:p text:style-name="P40"/>
      <text:p text:style-name="P41">Raises:</text:p>
      <text:p text:style-name="P27">Exception: KeyError if missing required arg for polling config (payer.id and requestTypeCode)</text:p>
      <text:p text:style-name="P40">Exception: If response from coverage API failed.</text:p>
      <text:p text:style-name="P40"/>
      <text:p text:style-name="P41"><text:span text:style-name="T1">getCoveragesSearch</text:span>(self, ids)</text:p>
      <text:p text:style-name="P40">Gets coverage details based on search Ids (from coveragePolling())</text:p>
      <text:p text:style-name="P24"/>
      <text:p text:style-name="P26">Args:</text:p>
      <text:p text:style-name="P26"><text:s text:c="5"/>ids (list[str])</text:p>
      <text:p text:style-name="P24"/>
      <text:p text:style-name="P26">Returns:</text:p>
      <text:p text:style-name="P27">json: format "coverages":[list of coverage details per ids]</text:p>
      <text:p text:style-name="P27"/>
      <text:p text:style-name="P28"/>
      <text:p text:style-name="P28"/>
      <text:h text:style-name="P10" text:outline-level="2"><text:bookmark-start text:name="__RefHeading___Toc30_293003922"/>Service Reviews API<text:bookmark-end text:name="__RefHeading___Toc30_293003922"/></text:h>
      <text:p text:style-name="P17">FILE</text:p>
      <text:p text:style-name="P42"><text:tab/>availityservicereviews.py</text:p>
      <text:p text:style-name="P14"/>
      <text:p text:style-name="P14">NAME</text:p>
      <text:p text:style-name="P28"><text:s text:c="4"/>AvailityServiceReviews</text:p>
      <text:p text:style-name="P14"/>
      <text:p text:style-name="P14">CLASSES</text:p>
      <text:p text:style-name="P43"><text:span text:style-name="T1">class ServiceReview</text:span>(AvailityAbstract.AvailityABC)</text:p>
      <text:p text:style-name="P44">Provides access to the Health Transactions Service Reviews API. Can be used to create/view Authorization and Referral Requests</text:p>
      <text:p text:style-name="P44">ServiceReview(key, secret)</text:p>
      <text:p text:style-name="P44"/>
      <text:p text:style-name="P45"><text:span text:style-name="T4">Methods defined here:</text:span></text:p>
      <text:p text:style-name="P46"><text:span text:style-name="T1">get</text:span>(self, params: json)</text:p>
      <text:p text:style-name="P27">Sends service review inquiry based on params.</text:p>
      <text:p text:style-name="P46"><text:span text:style-name="T6"/></text:p>
      <text:p text:style-name="P46"><text:span text:style-name="T6">Args</text:span>:</text:p>
      <text:p text:style-name="P47">params (json): all query paramter<text:span text:style-name="T5">s</text:span></text:p>
      <text:p text:style-name="P46"><text:span text:style-name="T6"/></text:p>
      <text:p text:style-name="P46"><text:span text:style-name="T6">Raises</text:span>:</text:p>
      <text:p text:style-name="P47">Exception: KeyError if missing required arg for polling config (payer.id and requestTypeCode)</text:p>
      <text:p text:style-name="P28"><text:s text:c="4"/></text:p>
      <text:h text:style-name="P10" text:outline-level="2"><text:bookmark-start text:name="__RefHeading___Toc32_293003922"/>Payer List API<text:bookmark-end text:name="__RefHeading___Toc32_293003922"/></text:h>
      <text:p text:style-name="P18">FILE</text:p>
      <text:p text:style-name="P49">availitypayerlist.py</text:p>
      <text:p text:style-name="P28"/>
      <text:p text:style-name="P14">NAME</text:p>
      <text:p text:style-name="P25">AvailityPayerList</text:p>
      <text:p text:style-name="P28"/>
      <text:p text:style-name="P14">CLASSES</text:p>
      <text:p text:style-name="P25"><text:span text:style-name="T1">class PayerList</text:span>(AvailityAbstract.AvailityABC)</text:p>
      <text:p text:style-name="P50">Provides access to the Healthcare Transactions Payer List API <text:s text:c="3"/></text:p>
      <text:p text:style-name="P50">PayerList(key, secret) <text:s text:c="2"/></text:p>
      <text:p text:style-name="P50"/>
      <text:p text:style-name="P49"><text:span text:style-name="T4">Methods defined here:</text:span></text:p>
      <text:p text:style-name="P50"><text:span text:style-name="T1">searchPayerList</text:span>(self, parameters=None)</text:p>
      <text:p text:style-name="P51">Search Payer list based on input parameters</text:p>
      <text:p text:style-name="P50"/>
      <text:p text:style-name="P50">Args:</text:p>
      <text:p text:style-name="P51">parameters(json | filename | dict, optional): search parameters. can include payerId, transactionType, submissionMode, availability, enrollmentRequired. Desc of each available <text:a xlink:type="simple" xlink:href="https://developer.availity.com/blog/2025/3/25/hipaa-transactions#payer_list:~:text=payers%20and%20transactions.-,Parameters,-Parameter" text:style-name="Internet_20_link" text:visited-style-name="Visited_20_Internet_20_Link"><text:span text:style-name="T7">here</text:span></text:a><text:span text:style-name="T7">.</text:span></text:p>
      <text:p text:style-name="P51"/>
      <text:p text:style-name="P48"/>
      <text:h text:style-name="P9" text:outline-level="1">JavaScript</text:h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23T11:27:34.884000000</meta:creation-date>
    <dc:date>2026-06-23T12:43:27.749000000</dc:date>
    <meta:editing-duration>PT33M42S</meta:editing-duration>
    <meta:editing-cycles>12</meta:editing-cycles>
    <meta:generator>LibreOffice/7.6.0.3$Windows_X86_64 LibreOffice_project/69edd8b8ebc41d00b4de3915dc82f8f0fc3b6265</meta:generator>
    <meta:document-statistic meta:table-count="0" meta:image-count="0" meta:object-count="0" meta:page-count="8" meta:paragraph-count="140" meta:word-count="756" meta:character-count="5577" meta:non-whitespace-character-count="4836"/>
  </office:meta>
</office:document-meta>
</file>